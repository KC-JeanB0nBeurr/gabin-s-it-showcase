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5e1b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T1" style:family="text">
      <style:text-properties officeooo:rsid="002552e5"/>
    </style:style>
    <style:style style:name="T2" style:family="text">
      <style:text-properties officeooo:rsid="0025e1bd"/>
    </style:style>
    <style:style style:name="T3" style:family="text">
      <style:text-properties officeooo:rsid="0026b6b2"/>
    </style:style>
    <style:style style:name="T4" style:family="text">
      <style:text-properties officeooo:rsid="0028a1a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OTE TECHNIQUE<text:line-break/>Projet BTS SIO – option SISR</text:p>
      <text:list xml:id="list1526349495" text:style-name="L11">
        <text:list-item>
          <text:p text:style-name="P11">Présentation générale du projet</text:p>
        </text:list-item>
      </text:list>
      <text:p text:style-name="Text_20_body">Nom du projet : Interconnexion de trois sites distants<text:line-break/>Responsable du projet : Gabin DONNIER<text:line-break/>Date de rédaction : <text:span text:style-name="T4">27</text:span>/02/2026<text:line-break/>Formation : BTS SIO – option SISR</text:p>
      <text:p text:style-name="Text_20_body">Ce projet a pour objectif de concevoir et de mettre en œuvre une interconnexion réseau entre trois sites distants. Chaque site est équipé de son propre routeur et relié aux deux autres par des liaisons physiques point-à-point. L’architecture retenue doit être simple, fiable et évolutive afin de répondre aux besoins actuels tout en permettant des extensions futures.</text:p>
      <text:list xml:id="list1647879535" text:style-name="L12">
        <text:list-item>
          <text:p text:style-name="P12">Contexte et objectifs</text:p>
        </text:list-item>
      </text:list>
      <text:p text:style-name="Text_20_body">Les trois sites doivent pouvoir communiquer entre eux afin de partager les données de manière fluide et sécurisée.</text:p>
      <text:p text:style-name="Text_20_body">Les objectifs du projet sont les suivants :<text:line-break/>– Assurer la communication inter-sites entre les trois entités de la filiale.<text:line-break/>– Déployer un routeur dédié sur chaque site et mettre en place des liaisons câblées point-à-point.<text:line-break/>– Mettre en œuvre un protocole de routage dynamique OSPF afin de garantir la diffusion automatique des routes et une convergence rapide en cas de panne ou de modification de la topologie.<text:line-break/>– Concevoir une architecture simple à exploiter et évolutive (ajout de nouveaux sites, mise en place de redondance supplémentaire).</text:p>
      <text:list xml:id="list1522018805" text:style-name="L13">
        <text:list-item>
          <text:p text:style-name="P13">Architecture réseau proposée</text:p>
        </text:list-item>
      </text:list>
      <text:p text:style-name="Text_20_body">L’architecture repose sur une topologie en anneau reliant les trois sites. Chaque site comprend :<text:line-break/>– un routeur assurant le routage inter-sites ;<text:line-break/>– un réseau local interne connecté au routeur ;<text:line-break/>– des liaisons physiques inter-sites ;<text:line-break/>– une configuration du routage dynamique OSPF ;<text:line-break/>– une documentation technique comprenant le plan d’adressage et les schémas réseau.</text:p>
      <text:p text:style-name="Text_20_body">Le choix de la topologie en anneau permet d’améliorer la tolérance aux pannes : en cas d’indisponibilité d’une liaison, le trafic peut être redirigé automatiquement via un chemin alternatif.</text:p>
      <text:list xml:id="list1880663542" text:style-name="L14">
        <text:list-item>
          <text:p text:style-name="P14">Choix techniques et justification</text:p>
        </text:list-item>
      </text:list>
      <text:p text:style-name="Text_20_body">4.1 Équipements réseau</text:p>
      <text:p text:style-name="Text_20_body">– Routeurs : routeurs de niveau entreprise ou pédagogique (Cisco ISR 900), compatibles avec le protocole de routage dynamique OSPF.<text:line-break/>– Switchs : switchs compatibles avec le protocole Spanning Tree (Cisco Business 220 Series / Cisco Business 250 Series).</text:p>
      <text:p text:style-name="Text_20_body">4.2 Protocole de routage</text:p>
      <text:p text:style-name="Text_20_body"><text:soft-page-break/>Le protocole OSPF (Open Shortest Path First) est retenu pour les raisons suivantes :<text:line-break/>– protocole de routage dynamique standardisé ;<text:line-break/>– convergence rapide en cas de modification de la topologie ;<text:line-break/>– facilité d’évolution (ajout de nouveaux sites ou réseaux).</text:p>
      <text:p text:style-name="Text_20_body">L’ensemble des routeurs sera intégré dans la même zone OSPF (zone 0) afin de simplifier la configuration et l’administration.</text:p>
      <text:p text:style-name="Text_20_body">4.3 Plan d’adressage IP</text:p>
      <text:p text:style-name="Text_20_body">Un plan d’adressage IP structuré sera défini :<text:line-break/>– un réseau dédié par site pour le réseau local ;<text:line-break/>– des sous-réseaux spécifiques pour chaque liaison point-à-point inter-sites.</text:p>
      <text:p text:style-name="Text_20_body">Cette organisation garantit une meilleure lisibilité, facilite la maintenance et permet une évolution plus aisée de l’infrastructure (schéma réseau joint).</text:p>
      <text:p text:style-name="Text_20_body">4.4 Redondance et continuité de service</text:p>
      <text:p text:style-name="Text_20_body">La redondance inter-sites est assurée par la topologie en anneau. En cas de coupure d’un lien, OSPF recalcule automatiquement les routes et redirige le trafic vers un autre chemin disponible.</text:p>
      <text:p text:style-name="Text_20_body">Le protocole Spanning Tree est également mis en œuvre pour gérer la redondance au niveau des switchs locaux du site 1.</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4T16:29:01.725000000</meta:creation-date>
    <dc:date>2026-02-27T10:41:24.365000000</dc:date>
    <meta:editing-duration>PT23M44S</meta:editing-duration>
    <meta:editing-cycles>9</meta:editing-cycles>
    <meta:generator>LibreOffice/7.3.2.2$Windows_X86_64 LibreOffice_project/49f2b1bff42cfccbd8f788c8dc32c1c309559be0</meta:generator>
    <meta:document-statistic meta:table-count="0" meta:image-count="0" meta:object-count="0" meta:page-count="2" meta:paragraph-count="22" meta:word-count="499" meta:character-count="3272" meta:non-whitespace-character-count="2781"/>
  </office:meta>
</office:document-meta>
</file>