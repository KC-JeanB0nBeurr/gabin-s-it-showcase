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f64de"/>
    </style:style>
    <style:style style:name="P2" style:family="paragraph" style:parent-style-name="Text_20_body">
      <style:text-properties officeooo:paragraph-rsid="002c510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paragraph-rsid="002ca8be"/>
    </style:style>
    <style:style style:name="P7" style:family="paragraph" style:parent-style-name="Text_20_body" style:list-style-name="L3"/>
    <style:style style:name="T1" style:family="text">
      <style:text-properties officeooo:rsid="002c510e"/>
    </style:style>
    <style:style style:name="T2" style:family="text">
      <style:text-properties officeooo:rsid="002ca8be"/>
    </style:style>
    <style:style style:name="T3" style:family="text">
      <style:text-properties officeooo:rsid="002e6d2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TECHNIQUE<text:line-break/>Projet BTS SIO – option SISR</text:p>
      <text:list xml:id="list2752827844" text:style-name="L1">
        <text:list-item>
          <text:p text:style-name="P3">Présentation générale du projet<text:line-break/>Nom du projet : Accès distant d’un poste informatique via VPN <text:span text:style-name="T2">et mise en place d’un serveur applicatif</text:span><text:line-break/>Responsable du projet : Gabin DONNIER<text:line-break/>Date de rédaction : 27/02/2026<text:line-break/>Formation : BTS SIO – option SISR </text:p>
        </text:list-item>
      </text:list>
      <text:p text:style-name="Text_20_body">Ce projet a pour objectif de mettre en place une solution d’accès distant sécurisé permettant à un poste informatique externe de se connecter à un <text:span text:style-name="T2">réseaux</text:span> interne <text:span text:style-name="T2">sécurisé et a la mise en place d’un serveur applicatif</text:span>.</text:p>
      <text:p text:style-name="Text_20_body">La connexion s’effectue au moyen d’un tunnel VPN sécurisé. Le trafic transite par un pare-feu avant d’atteindre le réseau interne, afin de garantir la confidentialité, l’intégrité et la traçabilité des communications entre le poste distant et l’infrastructure cible.</text:p>
      <text:list xml:id="list4112396079" text:style-name="L2">
        <text:list-item>
          <text:p text:style-name="P5">Contexte et objectifs<text:line-break/>Objectifs principaux du projet :<text:line-break/>– Assurer un accès sécurisé depuis un poste externe vers <text:span text:style-name="T2">un réseaux</text:span> interne.<text:line-break/>– Mettre en place un tunnel VPN conforme aux standards de sécurité en vigueur.<text:line-break/>– Garantir la confidentialité et l’intégrité des échanges entre le poste distant et le réseau interne.<text:line-break/>– Appliquer des règles de filtrage.</text:p>
          <text:p text:style-name="P6">– A<text:span text:style-name="T2">ssurer la disponibilité d’un serveur applicatif</text:span></text:p>
        </text:list-item>
        <text:list-item>
          <text:p text:style-name="P4">Architecture réseau proposée<text:line-break/>L’architecture repose sur une séparation claire entre le poste externe et le réseau interne. </text:p>
        </text:list-item>
      </text:list>
      <text:p text:style-name="Text_20_body">La mise en œuvre comprend :<text:line-break/>– l’installation et la configuration de la solution VPN ;<text:line-break/>– la configuration des règles de filtrage sur le pare-feu ;<text:line-break/>– le paramétrage du serveur applicatif<text:line-break/>– la mise en place d’un serveur applicatif de partage de fichiers via Yunohost.</text:p>
      <text:p text:style-name="P2">Le cheminement logique des flux est le suivant :<text:line-break/>Poste distant → <text:s/><text:span text:style-name="T1">VPN →</text:span> Pare-feu → <text:span text:style-name="T2">Réseaux interne</text:span>.</text:p>
      <text:list xml:id="list4179646462" text:style-name="L3">
        <text:list-item>
          <text:p text:style-name="P7">Choix techniques et justification </text:p>
        </text:list-item>
      </text:list>
      <text:p text:style-name="Text_20_body">4.1 Équipements réseau et sécurité<text:line-break/>Les équipements retenus dans le cadre du projet sont les suivants :<text:line-break/>– Switchs : Cisco Business 220 Series / Cisco Business 250 Series, compatibles avec le protocole Spanning Tree, assurant la commutation au sein du réseau local.<text:line-break/>– Pare-feu : Stormshield SN-Series-220, utilisé comme équipement central de sécurité pour la gestion du VPN, le filtrage des flux et la journalisation des connexions.</text:p>
      <text:p text:style-name="Text_20_body">4.2 Technologie VPN<text:line-break/>La solution VPN repose sur un tunnel SSL.</text:p>
      <text:p text:style-name="Text_20_body"><text:soft-page-break/>Les mécanismes de sécurité mis en œuvre comprennent :<text:line-break/>– le chiffrement des flux ;<text:line-break/>– l’authentification des utilisateurs ;<text:line-break/>– l’attribution dynamique d’adresses IP à partir d’un pool dédié ;<text:line-break/>– le contrôle strict des flux autorisés vers le réseau interne.</text:p>
      <text:p text:style-name="Text_20_body">4.3 Routage et filtrage<text:line-break/>Le routeur assure l’acheminement des flux entre l’interface externe et le pare-feu.</text:p>
      <text:p text:style-name="Text_20_body">Le pare-feu applique des règles de filtrage restrictives autorisant uniquement :<text:line-break/>– les flux issus du pool d’adresses VPN ;</text:p>
      <text:p text:style-name="Text_20_body">Dans le réseau interne, les règles de sécurité mises en place via le pare-feu permettent :<text:line-break/>– aux postes internes d’accéder a <text:span text:style-name="T3">internet</text:span> selon les besoins définis ;</text:p>
      <text:p text:style-name="Text_20_body">En revanche, aucun accès direct depuis le réseau externe vers les postes internes n’est autorisé.<text:line-break/>Les postes internes ne sont pas joignables depuis l’extérieur (par exemple via des requêtes de type ping), ce qui renforce l’isolation du réseau interne et limite la surface d’attaque.</text:p>
      <text:p text:style-name="Text_20_body">Tout autre trafic est explicitement bloqué afin de garantir un niveau de sécurité optimal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H11S</meta:editing-duration>
    <meta:editing-cycles>9</meta:editing-cycles>
    <meta:generator>LibreOffice/7.3.2.2$Windows_X86_64 LibreOffice_project/49f2b1bff42cfccbd8f788c8dc32c1c309559be0</meta:generator>
    <dc:date>2026-04-29T10:14:35.434000000</dc:date>
    <meta:document-statistic meta:table-count="0" meta:image-count="0" meta:object-count="0" meta:page-count="2" meta:paragraph-count="18" meta:word-count="501" meta:character-count="3196" meta:non-whitespace-character-count="2694"/>
  </office:meta>
</office:document-meta>
</file>